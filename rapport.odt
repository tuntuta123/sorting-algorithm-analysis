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Andika" svg:font-family="Andika"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3">
      <style:paragraph-properties fo:margin-left="0cm" fo:margin-right="0cm" fo:margin-top="0cm" fo:margin-bottom="0cm" style:contextual-spacing="false" fo:text-indent="0cm" style:auto-text-indent="false" style:writing-mode="lr-tb"/>
      <style:text-properties style:font-name="Andika"/>
    </style:style>
    <style:style style:name="P2" style:family="paragraph" style:parent-style-name="Normal_20__28_Web_29_">
      <style:paragraph-properties fo:margin-left="0cm" fo:margin-right="0cm" fo:margin-top="0cm" fo:margin-bottom="0cm" style:contextual-spacing="false" fo:text-indent="0cm" style:auto-text-indent="false" style:writing-mode="lr-tb"/>
    </style:style>
    <style:style style:name="P3" style:family="paragraph" style:parent-style-name="Normal_20__28_Web_29_">
      <style:paragraph-properties fo:margin-left="0cm" fo:margin-right="0cm" fo:margin-top="0cm" fo:margin-bottom="0.176cm" style:contextual-spacing="false" fo:text-indent="0cm" style:auto-text-indent="false" style:writing-mode="lr-tb"/>
    </style:style>
    <style:style style:name="P4" style:family="paragraph" style:parent-style-name="Normal_20__28_Web_29_">
      <style:paragraph-properties fo:margin-left="0cm" fo:margin-right="0cm" fo:margin-top="0cm" fo:margin-bottom="0cm" style:contextual-spacing="false" fo:text-indent="0cm" style:auto-text-indent="false" style:writing-mode="lr-tb"/>
      <style:text-properties style:font-name="Andika"/>
    </style:style>
    <style:style style:name="P5" style:family="paragraph" style:parent-style-name="Normal_20__28_Web_29_">
      <style:paragraph-properties fo:margin-left="0cm" fo:margin-right="0cm" fo:margin-top="0cm" fo:margin-bottom="0.176cm" style:contextual-spacing="false" fo:text-indent="0cm" style:auto-text-indent="false" style:writing-mode="lr-tb"/>
      <style:text-properties style:font-name="Andika"/>
    </style:style>
    <style:style style:name="P6" style:family="paragraph" style:parent-style-name="Normal_20__28_Web_29_">
      <style:paragraph-properties fo:margin-left="0cm" fo:margin-right="0cm" fo:margin-top="0.176cm" fo:margin-bottom="0.176cm" style:contextual-spacing="false" fo:text-indent="0cm" style:auto-text-indent="false" style:writing-mode="lr-tb"/>
      <style:text-properties style:font-name="Andika"/>
    </style:style>
    <style:style style:name="P7" style:family="paragraph" style:parent-style-name="Normal_20__28_Web_29_">
      <style:paragraph-properties fo:margin-left="0cm" fo:margin-right="0cm" fo:margin-top="0cm" fo:margin-bottom="0cm" style:contextual-spacing="false" fo:text-indent="0cm" style:auto-text-indent="false" style:writing-mode="lr-tb">
        <style:tab-stops>
          <style:tab-stop style:position="8.255cm" style:type="center"/>
        </style:tab-stops>
      </style:paragraph-properties>
      <style:text-properties style:font-name="Andika"/>
    </style:style>
    <style:style style:name="P8" style:family="paragraph" style:parent-style-name="Normal_20__28_Web_29_" style:list-style-name="WWNum5">
      <style:paragraph-properties fo:margin-left="1.905cm" fo:margin-right="0cm" fo:margin-top="0cm" fo:margin-bottom="0cm" style:contextual-spacing="false" fo:text-indent="-1.27cm" style:auto-text-indent="false" style:writing-mode="lr-tb"/>
      <style:text-properties style:font-name="Andika"/>
    </style:style>
    <style:style style:name="P9" style:family="paragraph" style:parent-style-name="Normal_20__28_Web_29_">
      <style:paragraph-properties fo:margin-left="0cm" fo:margin-right="0cm" fo:margin-top="0cm" fo:margin-bottom="0cm" style:contextual-spacing="false" fo:text-indent="0cm" style:auto-text-indent="false" style:writing-mode="lr-tb"/>
      <style:text-properties style:font-name="Andika" officeooo:paragraph-rsid="001e3db3"/>
    </style:style>
    <style:style style:name="P10" style:family="paragraph" style:parent-style-name="Normal_20__28_Web_29_">
      <style:paragraph-properties fo:margin-left="0cm" fo:margin-right="0cm" fo:margin-top="0cm" fo:margin-bottom="0.176cm" style:contextual-spacing="false" fo:text-indent="0cm" style:auto-text-indent="false" style:writing-mode="lr-tb"/>
      <style:text-properties style:font-name="Andika" officeooo:paragraph-rsid="001e3db3"/>
    </style:style>
    <style:style style:name="P11" style:family="paragraph" style:parent-style-name="Standard" style:list-style-name="">
      <style:paragraph-properties fo:margin-left="0cm" fo:margin-right="0cm" fo:margin-top="0cm" fo:margin-bottom="0cm" style:contextual-spacing="false" fo:text-indent="0cm" style:auto-text-indent="false" style:writing-mode="lr-tb"/>
      <style:text-properties style:font-name="Andika"/>
    </style:style>
    <style:style style:name="P12" style:family="paragraph" style:parent-style-name="Standard" style:list-style-name="">
      <style:paragraph-properties fo:margin-left="0cm" fo:margin-right="0cm" fo:margin-top="0cm" fo:margin-bottom="0cm" style:contextual-spacing="false" fo:text-indent="0cm" style:auto-text-indent="false" style:writing-mode="lr-tb"/>
      <style:text-properties style:font-name="Andika" fo:font-size="18pt" style:font-name-asian="Times New Roman1" style:font-size-asian="18pt" style:font-name-complex="Calibri2" style:font-size-complex="18pt" style:font-weight-complex="bold"/>
    </style:style>
    <style:style style:name="P13" style:family="paragraph" style:parent-style-name="Standard" style:list-style-name="WWNum1">
      <style:paragraph-properties fo:margin-left="1.27cm" fo:margin-right="0cm" fo:margin-top="0cm" fo:margin-bottom="0cm" style:contextual-spacing="false" fo:text-indent="-0.635cm" style:auto-text-indent="false" style:writing-mode="lr-tb">
        <style:tab-stops>
          <style:tab-stop style:position="1.27cm"/>
        </style:tab-stops>
      </style:paragraph-properties>
      <style:text-properties style:font-name="Andika"/>
    </style:style>
    <style:style style:name="P14" style:family="paragraph" style:parent-style-name="Standard" style:list-style-name="WWNum4">
      <style:paragraph-properties fo:margin-left="1.27cm" fo:margin-right="0cm" fo:margin-top="0cm" fo:margin-bottom="0cm" style:contextual-spacing="false" fo:text-indent="-0.635cm" style:auto-text-indent="false" style:writing-mode="lr-tb">
        <style:tab-stops>
          <style:tab-stop style:position="1.27cm"/>
        </style:tab-stops>
      </style:paragraph-properties>
      <style:text-properties style:font-name="Andika"/>
    </style:style>
    <style:style style:name="P15" style:family="paragraph" style:parent-style-name="Standard" style:list-style-name="WWNum2">
      <style:paragraph-properties fo:margin-left="1.27cm" fo:margin-right="0cm" fo:margin-top="0cm" fo:margin-bottom="0cm" style:contextual-spacing="false" fo:text-indent="-0.635cm" style:auto-text-indent="false" style:writing-mode="lr-tb">
        <style:tab-stops>
          <style:tab-stop style:position="1.27cm"/>
        </style:tab-stops>
      </style:paragraph-properties>
      <style:text-properties style:font-name="Andika"/>
    </style:style>
    <style:style style:name="P16" style:family="paragraph" style:parent-style-name="Standard" style:list-style-name="WWNum3">
      <style:paragraph-properties fo:margin-left="1.27cm" fo:margin-right="0cm" fo:margin-top="0cm" fo:margin-bottom="0cm" style:contextual-spacing="false" fo:text-indent="-0.635cm" style:auto-text-indent="false" style:writing-mode="lr-tb">
        <style:tab-stops>
          <style:tab-stop style:position="1.27cm"/>
        </style:tab-stops>
      </style:paragraph-properties>
      <style:text-properties style:font-name="Andika"/>
    </style:style>
    <style:style style:name="P17" style:family="paragraph" style:parent-style-name="Standard">
      <style:paragraph-properties fo:margin-left="0cm" fo:margin-right="0cm" fo:margin-top="0cm" fo:margin-bottom="0cm" style:contextual-spacing="false" fo:text-indent="0cm" style:auto-text-indent="false" style:writing-mode="lr-tb"/>
      <style:text-properties style:font-name="Andika" fo:font-size="12pt" style:font-name-asian="Times New Roman1" style:font-size-asian="12pt" style:font-name-complex="Calibri2" style:font-size-complex="12pt"/>
    </style:style>
    <style:style style:name="P18" style:family="paragraph" style:parent-style-name="Standard">
      <style:paragraph-properties fo:margin-left="0cm" fo:margin-right="0cm" fo:margin-top="0cm" fo:margin-bottom="0cm" style:contextual-spacing="false" fo:text-indent="0cm" style:auto-text-indent="false" style:writing-mode="lr-tb"/>
      <style:text-properties style:font-name="Andika"/>
    </style:style>
    <style:style style:name="P19" style:family="paragraph" style:parent-style-name="Standard">
      <style:paragraph-properties fo:margin-left="0cm" fo:margin-right="0cm" fo:margin-top="0cm" fo:margin-bottom="0cm" style:contextual-spacing="false" fo:text-indent="0cm" style:auto-text-indent="false" style:writing-mode="lr-tb"/>
      <style:text-properties style:font-name="Andika" style:font-name-complex="Calibri2"/>
    </style:style>
    <style:style style:name="P20" style:family="paragraph" style:parent-style-name="Standard">
      <style:paragraph-properties fo:margin-left="0cm" fo:margin-right="0cm" fo:margin-top="0cm" fo:margin-bottom="0cm" style:contextual-spacing="false" fo:line-height="107%" fo:text-indent="0cm" style:auto-text-indent="false" style:writing-mode="lr-tb"/>
      <style:text-properties style:font-name="Andika" style:font-name-complex="Calibri2"/>
    </style:style>
    <style:style style:name="P21" style:family="paragraph" style:parent-style-name="Standard" style:list-style-name="WWNum2">
      <style:paragraph-properties fo:margin-left="2.54cm" fo:margin-right="0cm" fo:margin-top="0cm" fo:margin-bottom="0cm" style:contextual-spacing="false" fo:text-indent="-0.635cm" style:auto-text-indent="false" style:writing-mode="lr-tb">
        <style:tab-stops>
          <style:tab-stop style:position="2.54cm"/>
        </style:tab-stops>
      </style:paragraph-properties>
      <style:text-properties style:font-name="Andika"/>
    </style:style>
    <style:style style:name="P22" style:family="paragraph" style:parent-style-name="Standard">
      <style:text-properties style:font-name="Andika"/>
    </style:style>
    <style:style style:name="T1" style:family="text">
      <style:text-properties fo:font-size="18pt" style:font-name-asian="Times New Roman1" style:font-size-asian="18pt" style:font-name-complex="Calibri2" style:font-size-complex="18pt" style:font-weight-complex="bold"/>
    </style:style>
    <style:style style:name="T2" style:family="text">
      <style:text-properties fo:font-size="18pt" style:font-size-asian="18pt" style:font-name-complex="Calibri2"/>
    </style:style>
    <style:style style:name="T3" style:family="text">
      <style:text-properties fo:font-size="18pt" style:font-size-asian="18pt" style:font-name-complex="Calibri2" style:font-size-complex="16pt"/>
    </style:style>
    <style:style style:name="T4" style:family="text">
      <style:text-properties fo:font-size="18pt" fo:language="fr" fo:country="FR" fo:font-weight="normal" style:font-size-asian="18pt" style:font-weight-asian="normal" style:font-name-complex="Calibri2"/>
    </style:style>
    <style:style style:name="T5" style:family="text">
      <style:text-properties style:font-name="Calibri" fo:font-size="14pt" style:font-size-asian="14pt" style:font-name-complex="Calibri2"/>
    </style:style>
    <style:style style:name="T6" style:family="text">
      <style:text-properties style:font-name="Calibri" fo:font-size="14pt" fo:language="fr" fo:country="FR" style:font-size-asian="14pt" style:font-name-complex="Calibri2"/>
    </style:style>
    <style:style style:name="T7" style:family="text">
      <style:text-properties style:font-name="Calibri" fo:font-size="14pt" fo:language="fr" fo:country="FR" fo:font-weight="normal" style:font-size-asian="14pt" style:font-weight-asian="normal" style:font-name-complex="Calibri2"/>
    </style:style>
    <style:style style:name="T8" style:family="text">
      <style:text-properties style:font-name="Calibri" style:font-name-complex="Calibri2"/>
    </style:style>
    <style:style style:name="T9" style:family="text">
      <style:text-properties style:font-name="Calibri" style:font-name-complex="Calibri2" style:font-weight-complex="bold"/>
    </style:style>
    <style:style style:name="T10" style:family="text">
      <style:text-properties style:font-name="Calibri" fo:language="fr" fo:country="FR" style:font-name-complex="Calibri2"/>
    </style:style>
    <style:style style:name="T11" style:family="text">
      <style:text-properties style:font-name="Calibri" fo:language="fr" fo:country="FR" style:font-name-complex="Calibri2" style:font-weight-complex="bold"/>
    </style:style>
    <style:style style:name="T12" style:family="text">
      <style:text-properties style:font-name="Calibri" fo:language="fr" fo:country="FR" fo:font-weight="bold" style:font-weight-asian="bold" style:font-name-complex="Calibri2"/>
    </style:style>
    <style:style style:name="T13" style:family="text">
      <style:text-properties style:font-name="Calibri" fo:language="fr" fo:country="FR" fo:font-weight="normal" style:font-weight-asian="normal" style:font-name-complex="Calibri2"/>
    </style:style>
    <style:style style:name="T14" style:family="text">
      <style:text-properties style:font-name="Calibri" fo:font-size="18pt" style:font-size-asian="18pt" style:font-name-complex="Calibri2"/>
    </style:style>
    <style:style style:name="T15" style:family="text">
      <style:text-properties style:font-name="Calibri" fo:font-size="18pt" style:font-size-asian="18pt" style:font-name-complex="Calibri2" style:font-size-complex="16pt"/>
    </style:style>
    <style:style style:name="T16" style:family="text">
      <style:text-properties style:font-name="Calibri" fo:font-size="18pt" fo:language="fr" fo:country="FR" fo:font-weight="normal" style:font-size-asian="18pt" style:font-weight-asian="normal" style:font-name-complex="Calibri2"/>
    </style:style>
    <style:style style:name="T17" style:family="text">
      <style:text-properties style:font-name="Calibri" fo:font-size="16pt" fo:language="fr" fo:country="FR" style:font-size-asian="16pt" style:font-name-complex="Calibri2" style:font-size-complex="16pt"/>
    </style:style>
    <style:style style:name="T18" style:family="text">
      <style:text-properties style:font-name="Calibri" fo:font-size="16pt" fo:language="fr" fo:country="FR" fo:font-weight="normal" style:font-size-asian="16pt" style:font-weight-asian="normal" style:font-name-complex="Calibri2"/>
    </style:style>
    <style:style style:name="T19" style:family="text">
      <style:text-properties style:font-name="Calibri" fo:font-size="16pt" style:font-size-asian="16pt" style:font-name-complex="Calibri2"/>
    </style:style>
    <style:style style:name="T20" style:family="text">
      <style:text-properties style:font-name="Calibri" fo:language="en" fo:country="US" style:language-asian="en" style:country-asian="US" style:font-name-complex="Calibri2" style:language-complex="ar" style:country-complex="SA"/>
    </style:style>
    <style:style style:name="T21" style:family="text">
      <style:text-properties style:font-name="Calibri" fo:language="en" fo:country="US" fo:font-weight="normal" style:language-asian="en" style:country-asian="US" style:font-weight-asian="normal" style:font-name-complex="Calibri2" style:language-complex="ar" style:country-complex="SA"/>
    </style:style>
    <style:style style:name="T22" style:family="text">
      <style:text-properties fo:font-size="12pt" style:font-name-asian="Times New Roman1" style:font-size-asian="12pt" style:font-name-complex="Calibri2" style:font-size-complex="12pt"/>
    </style:style>
    <style:style style:name="T23" style:family="text">
      <style:text-properties fo:font-size="12pt" style:font-name-asian="Times New Roman1" style:font-size-asian="12pt" style:font-name-complex="Calibri2" style:font-size-complex="12pt" style:font-weight-complex="bold"/>
    </style:style>
    <style:style style:name="T24" style:family="text">
      <style:text-properties fo:font-size="12pt" style:font-size-asian="12pt" style:font-size-complex="12pt"/>
    </style:style>
    <style:style style:name="T25" style:family="text">
      <style:text-properties fo:font-size="12pt" style:font-size-asian="12pt" style:font-name-complex="Calibri2"/>
    </style:style>
    <style:style style:name="T26" style:family="text">
      <style:text-properties fo:font-size="12pt" style:font-size-asian="12pt" style:font-name-complex="Calibri2" style:font-size-complex="12pt"/>
    </style:style>
    <style:style style:name="T27" style:family="text">
      <style:text-properties fo:font-size="12pt" style:font-size-asian="12pt" style:font-name-complex="Calibri2" style:font-weight-complex="bold"/>
    </style:style>
    <style:style style:name="T28" style:family="text">
      <style:text-properties fo:font-size="14pt" style:font-size-asian="14pt" style:font-name-complex="Calibri2"/>
    </style:style>
    <style:style style:name="T29" style:family="text">
      <style:text-properties fo:font-size="14pt" fo:language="fr" fo:country="FR" style:font-size-asian="14pt" style:font-name-complex="Calibri2"/>
    </style:style>
    <style:style style:name="T30" style:family="text">
      <style:text-properties fo:font-size="14pt" fo:language="fr" fo:country="FR" fo:font-weight="normal" style:font-size-asian="14pt" style:font-weight-asian="normal" style:font-name-complex="Calibri2"/>
    </style:style>
    <style:style style:name="T31" style:family="text">
      <style:text-properties style:font-name-complex="Calibri2"/>
    </style:style>
    <style:style style:name="T32" style:family="text">
      <style:text-properties style:font-name-complex="Calibri2" style:font-weight-complex="bold"/>
    </style:style>
    <style:style style:name="T33" style:family="text">
      <style:text-properties style:font-name="Times New Roman"/>
    </style:style>
    <style:style style:name="T34" style:family="text">
      <style:text-properties style:font-name="Times New Roman" fo:language="fr" fo:country="FR" style:font-name-complex="Calibri2"/>
    </style:style>
    <style:style style:name="T35" style:family="text">
      <style:text-properties fo:font-size="16pt" style:font-size-asian="16pt" style:font-name-complex="Calibri2"/>
    </style:style>
    <style:style style:name="T36" style:family="text">
      <style:text-properties fo:font-size="16pt" fo:language="fr" fo:country="FR" style:font-size-asian="16pt" style:font-name-complex="Calibri2" style:font-size-complex="16pt"/>
    </style:style>
    <style:style style:name="T37" style:family="text">
      <style:text-properties fo:font-size="16pt" fo:language="fr" fo:country="FR" fo:font-weight="normal" style:font-size-asian="16pt" style:font-weight-asian="normal" style:font-name-complex="Calibri2"/>
    </style:style>
    <style:style style:name="T38" style:family="text">
      <style:text-properties fo:language="fr" fo:country="FR" style:font-name-complex="Calibri2"/>
    </style:style>
    <style:style style:name="T39" style:family="text">
      <style:text-properties fo:language="fr" fo:country="FR" style:font-name-complex="Calibri2" style:font-weight-complex="bold"/>
    </style:style>
    <style:style style:name="T40" style:family="text">
      <style:text-properties fo:language="fr" fo:country="FR" fo:font-weight="normal" style:font-weight-asian="normal" style:font-name-complex="Calibri2"/>
    </style:style>
    <style:style style:name="T41" style:family="text">
      <style:text-properties fo:language="en" fo:country="US" style:language-asian="en" style:country-asian="US" style:font-name-complex="Calibri2" style:language-complex="ar" style:country-complex="SA"/>
    </style:style>
    <style:style style:name="T42" style:family="text">
      <style:text-properties fo:language="en" fo:country="US" fo:font-weight="normal" style:language-asian="en" style:country-asian="US" style:font-weight-asian="normal" style:font-name-complex="Calibri2" style:language-complex="ar" style:country-complex="SA"/>
    </style:style>
    <style:style style:name="T43" style:family="text">
      <style:text-properties style:font-name="Andika" style:font-name-complex="Calibri2"/>
    </style:style>
    <style:style style:name="T44" style:family="text">
      <style:text-properties style:font-name="Andika" fo:language="en" fo:country="US" style:language-asian="en" style:country-asian="US" style:font-name-complex="Calibri2" style:language-complex="ar" style:country-complex="SA"/>
    </style:style>
    <style:style style:name="T45" style:family="text">
      <style:text-properties style:font-name="Andika" fo:language="en" fo:country="US" fo:font-weight="normal" style:language-asian="en" style:country-asian="US" style:font-weight-asian="normal" style:font-name-complex="Calibri2"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 loext:marker-style-name="T1"><text:span text:style-name="T1">1. Introduction</text:span></text:h>
      <text:h text:style-name="P12" text:outline-level="2" loext:marker-style-name="T1"/>
      <text:p text:style-name="P4" loext:marker-style-name="T8"><text:span text:style-name="T28">1.1 Description générale du projet (avec vos propres mots)</text:span><text:span text:style-name="T31"><text:line-break/><text:line-break/>In this project, we explore the behavioral dynamics and performance metrics of various sorting algorithms. Sorting remains, a fundamental problem in computer science, yet the efficiency of an algorithm is rarely a static value. It is often a function of the initial state of the data. Our objective is to build a generator that can generate datasets with controlled levels of disorder and then use those datasets to evaluate how different sorting strategies from the simplest ones to more complex algorithms are reacting to those datasets. We have designed the project so that the </text:span><text:span text:style-name="T32">data creation</text:span><text:span text:style-name="T31"> and the </text:span><text:span text:style-name="T32">sorting algorithms</text:span><text:span text:style-name="T31"> are kept separate. This means we can change how we generate data without ever touching the code for the sorting algorithms, and the other way around.<text:line-break/><text:line-break/></text:span><text:span text:style-name="T28">1.2 Présentation du plan du rapport</text:span><text:span text:style-name="T31"><text:line-break/><text:line-break/>This report is structured to provide a comprehensive view of our development process:</text:span></text:p>
      <text:list text:style-name="WWNum1">
        <text:list-item>
          <text:p text:style-name="P13" loext:marker-style-name="T22"><text:span text:style-name="T23">Project objectives:</text:span><text:span text:style-name="T22"> Defining the scientific problem and </text:span><text:span text:style-name="T24">what data we will measure to compare the algorithms.</text:span></text:p>
        </text:list-item>
        <text:list-item>
          <text:p text:style-name="P13" loext:marker-style-name="T22"><text:span text:style-name="T23">Implemented Functionalities:</text:span><text:span text:style-name="T22"> A breakdown of the current implemented parts and team organization.</text:span></text:p>
        </text:list-item>
        <text:list-item>
          <text:p text:style-name="P13" loext:marker-style-name="T22"><text:span text:style-name="T23">Technical elements:</text:span><text:span text:style-name="T22"> Detailed explanations of the sorting logic and the data generation strategy.</text:span></text:p>
        </text:list-item>
        <text:list-item>
          <text:p text:style-name="P13" loext:marker-style-name="T22"><text:span text:style-name="T23">Project architecture:</text:span><text:span text:style-name="T22"> A description of the package structure and class interactions.</text:span></text:p>
        </text:list-item>
        <text:list-item>
          <text:p text:style-name="P13" loext:marker-style-name="T22"><text:span text:style-name="T23">Experiments:</text:span><text:span text:style-name="T22"> Initial observations from our terminal-based tests and later on from our </text:span><text:span text:style-name="T26">performance </text:span><text:span text:style-name="T22">tests.</text:span></text:p>
        </text:list-item>
        <text:list-item>
          <text:p text:style-name="P13" loext:marker-style-name="T22"><text:span text:style-name="T23">Conclusion:</text:span><text:span text:style-name="T22"> A summary of what we have already done and future planned improvements.</text:span></text:p>
        </text:list-item>
      </text:list>
      <text:p text:style-name="P17" loext:marker-style-name="T22"/>
      <text:p text:style-name="P17" loext:marker-style-name="T22"/>
      <text:p text:style-name="P17" loext:marker-style-name="T22"/>
      <text:p text:style-name="P17" loext:marker-style-name="T22"/>
      <text:p text:style-name="P18" loext:marker-style-name="T31"><text:soft-page-break/><text:span text:style-name="T2">2. Objectifs du projet<text:line-break/><text:line-break/></text:span><text:span text:style-name="T28">2.1 Problématique du projet (avec vos propres mots)<text:line-break/><text:line-break/></text:span><text:span text:style-name="T25">The central question we aim to answer is: </text:span><text:span text:style-name="T27">To what extent does the level and distribution of disorder in a dataset impact the efficiency of performance of sorting algorithms?</text:span><text:span text:style-name="T25"> While Big-O notation provides a theoretical upper bound, real world performance (comparisons, swaps, and execution time) varies significantly. For instance, an algorithm like Insertion Sort might outperform Quick Sort on a nearly sorted list. We aim to analyze these points where one algorithm becomes superior to another based on the input.<text:line-break/></text:span></text:p>
      <text:p text:style-name="P4" loext:marker-style-name="T5"><text:span text:style-name="T28">2.2 Description des points-clés et des grandes étapes<text:line-break/><text:line-break/></text:span><text:span text:style-name="T31">To address this problem, our project is organized into four main technical parts:</text:span></text:p>
      <text:list text:style-name="WWNum4">
        <text:list-item>
          <text:p text:style-name="P14" loext:marker-style-name="T22"><text:span text:style-name="T23">Data Generator</text:span><text:span text:style-name="T22">: We have implemented a generator capable of producing non-sorted data where we can fix the level of disorder. </text:span></text:p>
        </text:list-item>
        <text:list-item>
          <text:p text:style-name="P14" loext:marker-style-name="T22"><text:span text:style-name="T23">Algorithmic Implementation</text:span><text:span text:style-name="T22">: We have selected and implemented five algorithms with fundamentally different behaviors: </text:span><text:span text:style-name="T23">Bubble Sort</text:span><text:span text:style-name="T22">, </text:span><text:span text:style-name="T23">Insertion Sort</text:span><text:span text:style-name="T22">, </text:span><text:span text:style-name="T23">Quick Sort</text:span><text:span text:style-name="T22">, </text:span><text:span text:style-name="T23">Merge Sort</text:span><text:span text:style-name="T22">, and </text:span><text:span text:style-name="T23">Bucket Sort</text:span><text:span text:style-name="T22">. </text:span></text:p>
        </text:list-item>
        <text:list-item>
          <text:p text:style-name="P14" loext:marker-style-name="T22"><text:span text:style-name="T23">Visualization</text:span><text:span text:style-name="T22">: A key stage is the implementation of a generic visualization interface. This requires a system of listeners that can track every comparison and swap in real-time.</text:span></text:p>
        </text:list-item>
        <text:list-item>
          <text:p text:style-name="P14" loext:marker-style-name="T22"><text:span text:style-name="T23">Performance tracking</text:span><text:span text:style-name="T22">: The final stage involves conducting a scientific analysis to determine how the number of comparisons, data accesses, and time evolve as a function of the input parameters.</text:span></text:p>
        </text:list-item>
      </text:list>
      <text:p text:style-name="P4" loext:marker-style-name="T5"><text:span text:style-name="T28"><text:s/></text:span><text:span text:style-name="T28"/></text:p>
      <text:p text:style-name="P4" loext:marker-style-name="T34"><text:span text:style-name="T29">2.3 Description de travaux existants sur le même sujet<text:line-break/></text:span><text:span text:style-name="T39">Note:</text:span><text:span text:style-name="T38"> To be expanded. </text:span><text:span text:style-name="T31">More research is needed to complete this part. <text:s/></text:span></text:p>
      <text:p text:style-name="P9" loext:marker-style-name="T15"><text:span text:style-name="T2"><text:line-break/></text:span></text:p>
      <text:p text:style-name="P9" loext:marker-style-name="T15"><text:span text:style-name="T2"/></text:p>
      <text:p text:style-name="P9" loext:marker-style-name="T15"><text:span text:style-name="T3"/></text:p>
      <text:p text:style-name="P9" loext:marker-style-name="T15"><text:soft-page-break/><text:span text:style-name="T3">3. Fonctionnalités implémentées </text:span></text:p>
      <text:p text:style-name="P4" loext:marker-style-name="T12"><text:span text:style-name="T36"><text:line-break/></text:span><text:span text:style-name="T29">3.1 Description des fonctionalités (que peut-on faire)</text:span><text:span text:style-name="T38"><text:line-break/></text:span><text:span text:style-name="T39">Note:</text:span><text:span text:style-name="T38"> To be expanded. </text:span><text:span text:style-name="T31">More research is needed to complete this part.<text:line-break/><text:line-break/></text:span><text:span text:style-name="T28">3.2 Organisation du projet (qui a fait quoi)</text:span><text:span text:style-name="T31"><text:line-break/><text:line-break/>The development of this project was a collaborative effort, organized into specific technical domains to ensure code modularity and project efficiency.<text:line-break/>Tuna-generator and quick sort<text:line-break/>Mila-bubble sort and bucket sort<text:line-break/>Andrea-merge sort and insertion sort</text:span></text:p>
      <text:h text:style-name="P1" text:outline-level="3" loext:marker-style-name="T18"><text:span text:style-name="T40"><text:line-break/></text:span><text:span text:style-name="T30"> </text:span><text:span text:style-name="T4">4. Élements techniques</text:span></text:h>
      <text:h text:style-name="P1" text:outline-level="3" loext:marker-style-name="T13"><text:span text:style-name="T40"><text:line-break/></text:span><text:span text:style-name="T30">4.1 Descriptions des algorithmes (non triviaux)</text:span></text:h>
      <text:p text:style-name="P5" loext:marker-style-name="T8"><text:span text:style-name="T31">In this project, we have implemented five distinct algorithms : Bubble, Insertion, Quick, Merge, <text:s/>and <text:s/>Bucket Sort, from which in this paragraph we will only explain the non-trivial group algorithms, like Quick Sort, Merge Sort, and Bucket Sort. Below is the detailed technical analysis of them.</text:span></text:p>
      <text:p text:style-name="P5" loext:marker-style-name="T8"><text:span text:style-name="T31"/></text:p>
      <text:p text:style-name="P3" loext:marker-style-name="T33"><text:span text:style-name="T43">1. Quick Sort<text:line-break/> <text:line-break/>Quick Sort is a highly efficient sorting algorithm that works by splitting a large list into two smaller sub-lists. The algorithm picks one specific number from the list to act as a reference point. It then rearranges the list so that all numbers smaller than the reference point are moved to its left, and all numbers larger are moved to its right. This process is then repeated for the left and right sides until the whole list is sorted. The efficiency of Quick Sort relies on this choice. If the reference point consistently lands in the middle of the data values, the algorithm stays fast </text:span><text:span text:style-name="mord"><text:span text:style-name="T44">O</text:span></text:span><text:span text:style-name="mopen"><text:span text:style-name="T44">(</text:span></text:span><text:span text:style-name="mord"><text:span text:style-name="T44">n</text:span></text:span><text:span text:style-name="mop"><text:span text:style-name="T44">log</text:span></text:span><text:span text:style-name="mord"><text:span text:style-name="T44">n</text:span></text:span><text:span text:style-name="mclose"><text:span text:style-name="T44">)</text:span></text:span><text:span text:style-name="T43">. But if the reference point is always the smallest or largest number, it takes more steps to finish, which means it can reach its own worst case </text:span><text:span text:style-name="katex-mathml"><text:span text:style-name="T44">O(n^2).</text:span></text:span></text:p>
      <text:p text:style-name="P10" loext:marker-style-name="T8"><text:span text:style-name="T31"><text:s/></text:span></text:p>
      <text:p text:style-name="P10" loext:marker-style-name="T8"><text:soft-page-break/><text:span text:style-name="T31"><text:line-break/>2. Merge Sort </text:span></text:p>
      <text:p text:style-name="P10" loext:marker-style-name="T8"><text:span text:style-name="T31"/></text:p>
      <text:p text:style-name="P2" loext:marker-style-name="T8"><text:span text:style-name="T43">MergeSort is a sorting algorithm that works by dividing the array into smaller parts and then putting them back together in the correct order. First, it splits the array into two halves, then it splits each half again, and it keeps doing this until the parts are very small, usually 1. A part of size 1 is already sorted, so the important step is what will happens next. The algorithm </text:span><text:span text:style-name="Strong_20_Emphasis"><text:span text:style-name="T45">merges</text:span></text:span><text:span text:style-name="T43"> the small sorted parts together. During the merge step, it compares the first elements of the two parts and always takes the smaller one first, so the result stays sorted. It repeats this until both parts are completely merged into one sorted array. MergeSort always has the same time complexity, which is </text:span><text:span text:style-name="mord"><text:span text:style-name="T44">O</text:span></text:span><text:span text:style-name="mopen"><text:span text:style-name="T44">(</text:span></text:span><text:span text:style-name="mord"><text:span text:style-name="T44">n</text:span></text:span><text:span text:style-name="mop"><text:span text:style-name="T44">log</text:span></text:span><text:span text:style-name="mord"><text:span text:style-name="T44">n</text:span></text:span><text:span text:style-name="mclose"><text:span text:style-name="T44">)</text:span></text:span><text:span text:style-name="T43">, even in the worst case, but it usually needs extra memory because it creates temporary arrays during the merging.<text:line-break/></text:span></text:p>
      <text:p text:style-name="P4" loext:marker-style-name="T8"><text:span text:style-name="T31">3. Bucket Sort<text:line-break/></text:span><text:span text:style-name="T31"/></text:p>
      <text:p text:style-name="P2" loext:marker-style-name="T8"><text:span text:style-name="T43">BucketSort is a sorting algorithm that works by first spreading the elements into n buckets, and then sorting what is inside each bucket. The idea is that if the numbers are well distributed, then each bucket will contain only a small part of the data, which makes sorting easier. First, the algorithm decides how many buckets to use and what range of values goes into each bucket. Then it goes through the array and places every element into the correct bucket based on its value. After that, each bucket is sorted, using Insertion Sort. Finally, all buckets are joined together in order, which gives the fully sorted array. BucketSort can be very fast usually to </text:span><text:span text:style-name="Strong_20_Emphasis"><text:span text:style-name="T45">O(n)</text:span></text:span><text:span text:style-name="T43"> <text:s/>when the data is evenly spread, but if most elements end up in the same bucket, it becomes slower </text:span><text:span text:style-name="Strong_20_Emphasis"><text:span text:style-name="T45">O(n^2)</text:span></text:span><text:span text:style-name="T43"> <text:s/>because that bucket still has to do most of the work.</text:span></text:p>
      <text:p text:style-name="P18" loext:marker-style-name="T29"><text:span text:style-name="T31"><text:line-break/></text:span><text:span text:style-name="T29">4.2 Descriptions des structures de données (non triviales) </text:span></text:p>
      <text:p text:style-name="P18" loext:marker-style-name="T25"><text:span text:style-name="T27">Note:</text:span><text:span text:style-name="T25"> To be expanded. More research is needed to complete this part.</text:span></text:p>
      <text:p text:style-name="P18" loext:marker-style-name="T29"><text:span text:style-name="T31"><text:line-break/></text:span><text:span text:style-name="T29">4.3 Description des données </text:span></text:p>
      <text:p text:style-name="P18" loext:marker-style-name="T25"><text:span text:style-name="T27">Note:</text:span><text:span text:style-name="T25"> To be expanded. More research is needed to complete this part.</text:span></text:p>
      <text:p text:style-name="P19" loext:marker-style-name="T31"/>
      <text:p text:style-name="P19" loext:marker-style-name="T31"/>
      <text:p text:style-name="P19" loext:marker-style-name="T31"/>
      <text:p text:style-name="P19" loext:marker-style-name="T31"/>
      <text:p text:style-name="P7" loext:marker-style-name="T19"><text:soft-page-break/><text:span text:style-name="T2">5. Architecture du projet <text:tab/></text:span><text:span text:style-name="T35"/></text:p>
      <text:p text:style-name="P4" loext:marker-style-name="T5"><text:span text:style-name="T31"><text:line-break/></text:span><text:span text:style-name="T28">5.1 Description des paquetages non standards utilisés <text:line-break/></text:span><text:span text:style-name="T31"><text:line-break/>Our project is organized into two primary packages within the src directory, ensuring a clean separation between data generator and algorithmic part. Based on our structure, the organization is as follows:</text:span></text:p>
      <text:list text:style-name="WWNum2">
        <text:list-item>
          <text:p text:style-name="P15" loext:marker-style-name="T22"><text:span text:style-name="T23">Generator package:</text:span><text:span text:style-name="T22"> This module handles the creation of the initial datasets.</text:span></text:p>
          <text:list>
            <text:list-item>
              <text:p text:style-name="P21" loext:marker-style-name="T22"><text:span text:style-name="T22">NumberGenerator.java: The core interface defining the requirements for all generators.</text:span><text:span text:style-name="T22"/></text:p>
            </text:list-item>
            <text:list-item>
              <text:p text:style-name="P21" loext:marker-style-name="T22"><text:span text:style-name="T22">AbstractGenerator.java: Implementation providing common logic.</text:span><text:span text:style-name="T22"/></text:p>
            </text:list-item>
            <text:list-item>
              <text:p text:style-name="P21" loext:marker-style-name="T22"><text:span text:style-name="T22">SortedGenerator.java: Logic for generating perfectly ordered sequences.</text:span><text:span text:style-name="T22"/></text:p>
            </text:list-item>
            <text:list-item>
              <text:p text:style-name="P21" loext:marker-style-name="T22"><text:span text:style-name="T22">SwapSortGenerator.java: Logic for introducing controlled swaps into the data.</text:span><text:span text:style-name="T22"/></text:p>
            </text:list-item>
          </text:list>
        </text:list-item>
        <text:list-item>
          <text:p text:style-name="P15" loext:marker-style-name="T22"><text:span text:style-name="T23">Sorting package:</text:span><text:span text:style-name="T22"> This module contains the implementation of the sorting algorithms and the event-tracking system.</text:span></text:p>
          <text:list>
            <text:list-item>
              <text:p text:style-name="P21" loext:marker-style-name="T22"><text:span text:style-name="T22">BubbleSort.java, BucketSort.java, InsertionSorting.java, MergeSorting.java, QuickSort.java: Specific algorithmic implementations.</text:span><text:span text:style-name="T22"/></text:p>
            </text:list-item>
            <text:list-item>
              <text:p text:style-name="P21" loext:marker-style-name="T22"><text:span text:style-name="T22">Listener.java &amp; SortingListener.java: The classes for monitoring algorithmic steps like comparisons and swaps.</text:span><text:span text:style-name="T22"/></text:p>
            </text:list-item>
          </text:list>
        </text:list-item>
      </text:list>
      <text:p text:style-name="P4" loext:marker-style-name="T8"><text:span text:style-name="T31"><text:line-break/></text:span><text:span text:style-name="T28">5.2 Diagrammes des modules et des classes <text:line-break/></text:span><text:span text:style-name="T31"><text:line-break/>The architecture relies on an </text:span><text:span text:style-name="T32">interface design</text:span><text:span text:style-name="T31">, allowing the sorting algorithms to be independent of the data source.</text:span></text:p>
      <text:list text:style-name="WWNum5">
        <text:list-item>
          <text:p text:style-name="P8" loext:marker-style-name="T8"><text:span text:style-name="T32">The Generator : We utilize an abstract class AbstractGenerator to ensure that every generator follows a strict initialization sequence through the init() method. This ensures that the generate() logic is always executed before the data is accessed.</text:span><text:span text:style-name="T32"/></text:p>
        </text:list-item>
        <text:list-item>
          <text:p text:style-name="P8" loext:marker-style-name="T8"><text:span text:style-name="T32">The Sorting : While each algorithm is implemented in its own class, they all operate on the standard java.util.List interface. This allows us to switch between algorithms in our Demo class without modifying the data structure.</text:span><text:span text:style-name="T32"/></text:p>
        </text:list-item>
      </text:list>
      <text:p text:style-name="P6" loext:marker-style-name="T8"><text:span text:style-name="T31"/></text:p>
      <text:p text:style-name="P6" loext:marker-style-name="T8"><text:span text:style-name="T31"/></text:p>
      <text:p text:style-name="P6" loext:marker-style-name="T8"><text:soft-page-break/><text:span text:style-name="T31"><text:line-break/></text:span><text:span text:style-name="T28">5.3 Chaînes de traitement (comment les classes interagissent et pourquoi) <text:line-break/></text:span><text:span text:style-name="T31"><text:line-break/>A key element of our architecture is the implementation of the Observer Design Pattern to track comparisons and swaps.</text:span></text:p>
      <text:p text:style-name="P6" loext:marker-style-name="T8"><text:span text:style-name="T31">1. Event Triggering : Inside each sorting class, we have manually inserted calls to SortingListener.notifyComparison() and SortingListener.notifySwap().<text:line-break/>2. Notification : The SortingListener class acts as a static dispatcher. It maintains a list of all registered Listener objects.<text:line-break/>3. Visualization: By using this chain, the algorithms do not need to know if they are being watched by a terminal or a graphical UI. They simply broadcast their state changes.<text:line-break/><text:line-break/>The typical execution flow in our system follows these steps:</text:span><text:span text:style-name="T31"/></text:p>
      <text:list text:style-name="WWNum3">
        <text:list-item>
          <text:p text:style-name="P16" loext:marker-style-name="T22"><text:span text:style-name="T23">Step 1 : </text:span><text:span text:style-name="T22">The user creates a SwapSortGenerator with a specific swapRatio (example 0.5).</text:span></text:p>
        </text:list-item>
        <text:list-item>
          <text:p text:style-name="P16" loext:marker-style-name="T22"><text:span text:style-name="T23">Step 2 :</text:span><text:span text:style-name="T22"> The generator produces a list where 50% of the elements have been randomly swapped.</text:span></text:p>
        </text:list-item>
        <text:list-item>
          <text:p text:style-name="P16" loext:marker-style-name="T22"><text:span text:style-name="T23">Step 3 :</text:span><text:span text:style-name="T22"> A listener is added to SortingListener to capture the algorithm's performance.</text:span></text:p>
        </text:list-item>
        <text:list-item>
          <text:p text:style-name="P16" loext:marker-style-name="T22"><text:span text:style-name="T23">Step 4 :</text:span><text:span text:style-name="T22"> The chosen sorting class (example MergeSorting) processes the list.</text:span></text:p>
        </text:list-item>
        <text:list-item>
          <text:p text:style-name="P16" loext:marker-style-name="T22"><text:span text:style-name="T23">Step 5 :</text:span><text:span text:style-name="T22"> Every internal move is sent back to the listener for real-time analysis or terminal output.</text:span></text:p>
        </text:list-item>
      </text:list>
      <text:p text:style-name="P19" loext:marker-style-name="T31"/>
      <text:p text:style-name="P18" loext:marker-style-name="T31"><text:span text:style-name="T2">6. Expérimentations </text:span><text:span text:style-name="T31"><text:line-break/></text:span><text:span text:style-name="T27">Note:</text:span><text:span text:style-name="T25"> This section currently focuses on functional verification. Quantitative performance results (benchmarks) will be added in the next phase.</text:span></text:p>
      <text:p text:style-name="P18" loext:marker-style-name="T31"><text:span text:style-name="T2">7. Conclusion </text:span><text:span text:style-name="T35"><text:line-break/></text:span><text:span text:style-name="T27">Note:</text:span><text:span text:style-name="T25"> To be expanded. Currently, our project generates data and sorts it while tracking operations. Our next major step is to implement the </text:span><text:span text:style-name="T27">Graphical Visualization</text:span><text:span text:style-name="T25"> and </text:span><text:span text:style-name="T27">Benchmark</text:span><text:span text:style-name="T25"> modules to begin the formal scientific analysis.</text:span></text:p>
      <text:p text:style-name="P20" loext:marker-style-name="T31"/>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Andika" svg:font-family="Andika"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AR PL UMing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UMing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font-weight-asian="bold" style:font-size-complex="13.5pt" style:font-weight-complex="bold"/>
    </style:style>
    <style:style style:name="katex-mathml"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mord"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mopen"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mop"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mclose"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name-asian="Times New Roman1" style:font-family-asian="'Times New Roman'" style:font-family-generic-asian="system" style:font-pitch-asian="variable"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Calibri"/>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1.27cm" fo:margin-left="1.905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7T14:57:04.240026034</meta:creation-date>
    <dc:date>2026-02-27T14:59:45.126496800</dc:date>
    <meta:editing-duration>PT2M42S</meta:editing-duration>
    <meta:editing-cycles>1</meta:editing-cycles>
    <meta:document-statistic meta:table-count="0" meta:image-count="0" meta:object-count="0" meta:page-count="6" meta:paragraph-count="54" meta:word-count="1540" meta:character-count="9815" meta:non-whitespace-character-count="8302"/>
    <meta:generator>LibreOffice/24.2.7.2$Linux_X86_64 LibreOffice_project/420$Build-2</meta:generator>
  </office:meta>
</office:document-meta>
</file>