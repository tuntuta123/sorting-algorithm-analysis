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29pt" style:font-size-asian="29pt" style:font-size-complex="29pt"/>
    </style:style>
    <style:style style:name="P4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text-properties fo:font-size="21pt" style:font-size-asian="21pt" style:font-size-complex="21pt"/>
    </style:style>
    <style:style style:name="P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9pt" fo:font-weight="bold" style:font-size-asian="29pt" style:font-weight-asian="bold" style:font-size-complex="29pt" style:font-weight-complex="bold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1.027cm" presentation:class="title" presentation:user-transformed="true">
          <draw:text-box>
            <text:p>Projet : Analyse des algorithmes de tris</text:p>
          </draw:text-box>
        </draw:frame>
        <draw:frame presentation:style-name="pr2" draw:text-style-name="P1" draw:layer="layout" svg:width="25.199cm" svg:height="9.134cm" svg:x="1.5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Problematic of the project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Sorting Algorithm Performance</text:span></text:p>
              </text:list-header>
              <text:list-item>
                <text:p text:style-name="P4"><text:span text:style-name="T2">Core Problem</text:span><text:span text:style-name="T3">:</text:span></text:p>
                <text:p text:style-name="P5"><text:span text:style-name="T3">How does the level and distribution of disorder in the data affect the </text:span><text:span text:style-name="T3">performance of sorting algorithms?</text:span></text:p>
                <text:p text:style-name="P4"><text:span text:style-name="T3">What are the efficiency differences when sorting data with varying levels </text:span><text:span text:style-name="T3">of disorder?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bjectives of the project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4">1. Design a Data Generator</text:span></text:p>
                <text:p text:style-name="P7"><text:span text:style-name="T4">2. Implement Sorting Algorithms</text:span></text:p>
                <text:p text:style-name="P7"><text:span text:style-name="T4">3. Performance Tracking</text:span></text:p>
                <text:p text:style-name="P7"><text:span text:style-name="T4">4. Data Analysis</text:span></text:p>
                <text:p text:style-name="P7"><text:span text:style-name="T4">5. Visualize the Sorting Proces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3:36:40.496934479</meta:creation-date>
    <dc:date>2026-01-31T13:52:47.689744129</dc:date>
    <meta:editing-duration>PT4M31S</meta:editing-duration>
    <meta:editing-cycles>1</meta:editing-cycles>
    <meta:document-statistic meta:object-count="33"/>
    <meta:generator>LibreOffice/24.2.7.2$Linux_X86_64 LibreOffice_project/420$Build-2</meta:generator>
  </office:meta>
</office:document-meta>
</file>