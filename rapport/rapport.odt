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Andika" svg:font-family="Andika"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Normal_20__28_Web_29_">
      <style:paragraph-properties fo:margin-left="0cm" fo:margin-right="0cm" fo:margin-top="0cm" fo:margin-bottom="0.176cm" style:contextual-spacing="false" fo:text-indent="0cm" style:auto-text-indent="false" style:writing-mode="lr-tb"/>
      <style:text-properties style:font-name="Andika" officeooo:paragraph-rsid="001540f1"/>
    </style:style>
    <style:style style:name="P2" style:family="paragraph" style:parent-style-name="Normal_20__28_Web_29_">
      <style:paragraph-properties fo:margin-left="0cm" fo:margin-right="0cm" fo:margin-top="0cm" fo:margin-bottom="0cm" style:contextual-spacing="false" fo:text-indent="0cm" style:auto-text-indent="false" style:writing-mode="lr-tb"/>
      <style:text-properties officeooo:paragraph-rsid="001540f1"/>
    </style:style>
    <style:style style:name="P3" style:family="paragraph" style:parent-style-name="Heading_20_1">
      <style:text-properties style:font-name="Andika"/>
    </style:style>
    <style:style style:name="P4" style:family="paragraph" style:parent-style-name="Heading_20_2">
      <style:text-properties style:font-name="Andika"/>
    </style:style>
    <style:style style:name="P5" style:family="paragraph" style:parent-style-name="List_20_Paragraph" style:list-style-name="WWNum2">
      <style:paragraph-properties fo:margin-top="0cm" fo:margin-bottom="0.141cm" style:contextual-spacing="false"/>
      <style:text-properties style:font-name="Andika"/>
    </style:style>
    <style:style style:name="P6" style:family="paragraph" style:parent-style-name="Standard">
      <style:paragraph-properties fo:margin-top="0cm" fo:margin-bottom="0.282cm" style:contextual-spacing="false"/>
      <style:text-properties style:font-name="Andika"/>
    </style:style>
    <style:style style:name="P7" style:family="paragraph" style:parent-style-name="Standard">
      <style:paragraph-properties fo:margin-top="0cm" fo:margin-bottom="0.141cm" style:contextual-spacing="false"/>
      <style:text-properties style:font-name="Andika"/>
    </style:style>
    <style:style style:name="P8" style:family="paragraph" style:parent-style-name="Standard">
      <style:paragraph-properties fo:margin-top="0.282cm" fo:margin-bottom="0.141cm" style:contextual-spacing="false"/>
      <style:text-properties style:font-name="Andik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540f1"/>
    </style:style>
    <style:style style:name="T4" style:family="text">
      <style:text-properties style:font-name-complex="Calibri1"/>
    </style:style>
    <style:style style:name="T5" style:family="text">
      <style:text-properties style:font-name="Andika" style:font-name-complex="Calibri1"/>
    </style:style>
    <style:style style:name="T6" style:family="text">
      <style:text-properties style:font-name="Andika" fo:language="en" fo:country="US" fo:font-weight="normal" style:language-asian="en" style:country-asian="US" style:font-weight-asian="normal" style:font-name-complex="Calibri1"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1. Introduction</text:h>
      <text:h text:style-name="P4" text:outline-level="2">1.1 Description générale du projet (avec vos propres mots)</text:h>
      <text:p text:style-name="P6">In this project, we explore the behavioral dynamics and performance metrics of various sorting algorithms. Sorting remains a fundamental problem in computer science, yet the efficiency of an algorithm is rarely a static value. It is often a function of the initial state of the data. Our objective is to build a generator that can generate datasets with controlled levels of disorder and then use those datasets to evaluate how different sorting strategies - from the simplest ones to more complex algorithms - are reacting to those datasets. We have designed the project so that the data creation and the sorting algorithms are kept separate. This means we can change how we generate data without ever touching the code for the sorting algorithms, and the other way around.</text:p>
      <text:h text:style-name="P4" text:outline-level="2">1.2 Présentation du plan du rapport</text:h>
      <text:p text:style-name="P7">This report is structured to provide a comprehensive view of our development process:</text:p>
      <text:list text:style-name="WWNum2">
        <text:list-item text:start-value="1">
          <text:p text:style-name="P5">Project objectives: Defining the scientific problem and what data we will measure to compare the algorithms.</text:p>
        </text:list-item>
        <text:list-item>
          <text:p text:style-name="P5">Implemented Functionalities: A breakdown of the current implemented parts and team organization.</text:p>
        </text:list-item>
        <text:list-item>
          <text:p text:style-name="P5">Technical elements: Detailed explanations of the sorting logic and the data generation strategy.</text:p>
        </text:list-item>
        <text:list-item>
          <text:p text:style-name="P5">Project architecture: A description of the package structure and class interactions.</text:p>
        </text:list-item>
        <text:list-item>
          <text:p text:style-name="P5">Experiments: Initial observations from our terminal-based tests and later on from our performance tests.</text:p>
        </text:list-item>
        <text:list-item>
          <text:p text:style-name="P5">Conclusion: A summary of what we have already done and future planned improvements.</text:p>
        </text:list-item>
      </text:list>
      <text:h text:style-name="P3" text:outline-level="1"><text:soft-page-break/>2. Objectifs du projet</text:h>
      <text:h text:style-name="P4" text:outline-level="2">2.1 Problématique du projet (avec vos propres mots)</text:h>
      <text:p text:style-name="P6">The central question we aim to answer is: To what extent does the level and distribution of disorder in a dataset impact the efficiency and performance of sorting algorithms? While Big-O notation provides a theoretical upper bound, real-world performance (comparisons, swaps, and execution time) varies significantly. For instance, an algorithm like Insertion Sort might outperform Quick Sort on a nearly sorted list. We aim to analyze these crossover points where one algorithm becomes superior to another based on the input.</text:p>
      <text:h text:style-name="P4" text:outline-level="2">2.2 Description des points-clés et des grandes étapes</text:h>
      <text:p text:style-name="P7">To address this problem, our project is organized into four main technical parts:</text:p>
      <text:list text:continue-numbering="true" text:style-name="WWNum2">
        <text:list-item>
          <text:p text:style-name="P5">Data Generator: We have implemented a generator capable of producing non-sorted data where we can fix the level of disorder.</text:p>
        </text:list-item>
        <text:list-item>
          <text:p text:style-name="P5">Algorithmic Implementation: We have selected and implemented five algorithms with fundamentally different behaviors: Bubble Sort, Insertion Sort, Quick Sort, Merge Sort, and Bucket Sort.</text:p>
        </text:list-item>
        <text:list-item>
          <text:p text:style-name="P5">Visualization: A key stage is the implementation of a generic visualization interface. This requires a system of listeners that can track every comparison and swap in real-time.</text:p>
        </text:list-item>
        <text:list-item>
          <text:p text:style-name="P5">Performance tracking: The final stage involves conducting a scientific analysis to determine how the number of comparisons, data accesses, and time evolve as a function of the input parameters.</text:p>
        </text:list-item>
      </text:list>
      <text:h text:style-name="P4" text:outline-level="2">2.3 Description de travaux existants sur le même sujet</text:h>
      <text:p text:style-name="P6"><text:span text:style-name="T1">Note: To be expanded. More research is needed to complete this part.</text:span></text:p>
      <text:h text:style-name="P3" text:outline-level="1">3. Fonctionnalités implémentées</text:h>
      <text:h text:style-name="P4" text:outline-level="2">3.1 Description des fonctionnalités (que peut-on faire)</text:h>
      <text:p text:style-name="P7">The application currently offers two main modes accessible from the main menu:</text:p>
      <text:list text:continue-numbering="true" text:style-name="WWNum2">
        <text:list-item>
          <text:p text:style-name="P5">Single Algorithm Visualizer: The user selects one sorting algorithm and a data generator (Random or Entropy-based). The visualizer animates the <text:soft-page-break/>sorting process in real-time, with bars highlighted in red during comparisons and swaps. Controls include Start, Pause/Resume, Reset, a size spinner, and a speed slider.</text:p>
        </text:list-item>
        <text:list-item>
          <text:p text:style-name="P5">Comparison Visualizer: The user selects two different algorithms and a shared generator. Both sorts run in parallel on identical data, displayed side by side in the same window. This allows direct visual comparison of how each algorithm approaches the same dataset.</text:p>
        </text:list-item>
        <text:list-item>
          <text:p text:style-name="P5">Performance Statistics: After a sort completes, the user can click the View Performance button to open a statistics popup showing the total number of comparisons, swaps, and elapsed time in milliseconds for the run.</text:p>
        </text:list-item>
        <text:list-item>
          <text:p text:style-name="P5">Generator Selection: The user can choose between a Random generator and an Entropy-based generator. When Entropy is selected, a field appears to enter a disorder level between 0.0 (fully sorted) and 1.0 (fully random).</text:p>
        </text:list-item>
        <text:list-item>
          <text:p text:style-name="P5">Navigation: A Back to Menu button is available in all visualizer windows to return to the main menu without restarting the application.</text:p>
        </text:list-item>
      </text:list>
      <text:h text:style-name="P4" text:outline-level="2">3.2 Organisation du projet (qui a fait quoi)</text:h>
      <text:p text:style-name="P7">The development of this project was a collaborative effort, organized into specific technical domains to ensure code modularity and project efficiency.</text:p>
      <text:list text:continue-numbering="true" text:style-name="WWNum2">
        <text:list-item>
          <text:p text:style-name="P5">Tuna - Data generator and Quick Sort implementation.</text:p>
        </text:list-item>
        <text:list-item>
          <text:p text:style-name="P5">Mila - Bubble Sort and Bucket Sort implementation.</text:p>
        </text:list-item>
        <text:list-item>
          <text:p text:style-name="P5">Andrea - Merge Sort, Insertion Sort <text:span text:style-name="T3">implementation</text:span></text:p>
        </text:list-item>
      </text:list>
      <text:h text:style-name="P3" text:outline-level="1">4. Éléments techniques</text:h>
      <text:h text:style-name="P4" text:outline-level="2">4.1 Descriptions des algorithmes (non triviaux)</text:h>
      <text:p text:style-name="P1"><text:span text:style-name="T4">In this project, we have implemented five distinct algorithms : Bubble, Insertion, Quick, Merge, <text:s/>and <text:s/>Bucket Sort, from which in this paragraph we will only explain the non-trivial group algorithms, like Quick Sort, Merge Sort, and Bucket Sort. Below is the detailed technical analysis of them.</text:span></text:p>
      <text:p text:style-name="P8"><text:span text:style-name="T2">1. Quick Sort</text:span></text:p>
      <text:p text:style-name="P6"><text:soft-page-break/>Quick Sort is a highly efficient sorting algorithm that works by splitting a large list into two smaller sub-lists. The algorithm picks one specific number from the list to act as a reference point (the pivot). It then rearranges the list so that all numbers smaller than the pivot are moved to its left, and all numbers larger are moved to its right. This process is then repeated recursively for each side until the whole list is sorted. The efficiency of Quick Sort relies heavily on pivot selection. If the pivot consistently lands in the middle of the data values, the algorithm performs in O(n log n). However, if the pivot is always the smallest or largest element, it degrades to its worst case of O(n²).</text:p>
      <text:p text:style-name="P7"><text:span text:style-name="T2">2. Merge Sort</text:span></text:p>
      <text:p text:style-name="P6">Merge Sort is a sorting algorithm that works by dividing the array into smaller parts and then merging them back together in sorted order. It recursively splits the array in half until each part has size 1 (which is trivially sorted), then merges pairs of sorted parts by repeatedly taking the smaller of the two front elements. Merge Sort always runs in O(n log n) even in the worst case, which makes it reliable. However, it requires additional memory for the temporary arrays created during the merge step. As a consequence, the swap counter will always read 0 for Merge Sort, since it does not perform in-place swaps but instead writes to auxiliary arrays.</text:p>
      <text:p text:style-name="P7"><text:span text:style-name="T2">3. Bucket Sort</text:span></text:p>
      <text:p text:style-name="P2"><text:span text:style-name="T5">BucketSort is a sorting algorithm that works by first spreading the elements into n buckets, and then sorting what is inside each bucket. The idea is that if the numbers are well distributed, then each bucket will contain only a small part of the data, which makes sorting easier. First, the algorithm decides how many buckets to use and what range of values goes into each bucket. Then it goes through the array and places every element into the correct bucket based on its value. After that, each bucket is sorted, using Insertion Sort. Finally, all buckets are joined together in order, which gives the fully sorted array. BucketSort can be very fast usually to </text:span><text:span text:style-name="Strong_20_Emphasis"><text:span text:style-name="T6">O(n)</text:span></text:span><text:span text:style-name="T5"> <text:s/>when the data is evenly spread, but if most elements end up in the same bucket, it becomes slower </text:span><text:span text:style-name="Strong_20_Emphasis"><text:span text:style-name="T6">O(n^2)</text:span></text:span><text:span text:style-name="T5"> <text:s/>because that bucket still has to do most of the work.</text:span></text:p>
      <text:h text:style-name="P4" text:outline-level="2">4.2 Descriptions des structures de données (non triviales)</text:h>
      <text:p text:style-name="P6"><text:span text:style-name="T1">Note: To be expanded. More research is needed to complete this part.</text:span></text:p>
      <text:h text:style-name="P4" text:outline-level="2"><text:soft-page-break/>4.3 Description des données</text:h>
      <text:p text:style-name="P6"><text:span text:style-name="T1">Note: To be expanded. More research is needed to complete this part.</text:span></text:p>
      <text:h text:style-name="P3" text:outline-level="1">5. Architecture du projet</text:h>
      <text:h text:style-name="P4" text:outline-level="2">5.1 Description des paquetages non standards utilisés</text:h>
      <text:p text:style-name="P7">The project follows a Model-View-Controller (MVC) architecture, organized into six packages within the src directory:</text:p>
      <text:list text:continue-numbering="true" text:style-name="WWNum2">
        <text:list-item>
          <text:p text:style-name="P5">generator - Handles the creation of initial datasets. Contains NumberGenerator (interface), AbstractGenerator, SortedGenerator, RandomGenerator, SwapSortGenerator, and EntropyGenerator.</text:p>
        </text:list-item>
        <text:list-item>
          <text:p text:style-name="P5">sorting - Contains the five algorithm implementations and the observer event system: Listener (interface), SortingListener, BubbleSort, InsertionSorting, MergeSorting, QuickSort, BucketSort.</text:p>
        </text:list-item>
        <text:list-item>
          <text:p text:style-name="P5">model - Contains SortStats, a plain data class that accumulates comparison count, swap count, and elapsed time for a single algorithm run.</text:p>
        </text:list-item>
        <text:list-item>
          <text:p text:style-name="P5">controller - Contains VisualizerController and CompareController which own all sorting logic and orchestrate the sort runners. Also contains AbstractSortRunner, SortRunner, CompareSortRunner, VisualizationListener, and StatsListener.</text:p>
        </text:list-item>
        <text:list-item>
          <text:p text:style-name="P5">view/menu - Contains the menu screens: MenuInterface (interface), AbstractMenu (abstract base with shared styling and entropy validation), MainMenu, SingleAlgoMenu, and CompareMenu.</text:p>
        </text:list-item>
        <text:list-item>
          <text:p text:style-name="P5">view/window - Contains the visualizer windows: VisualizerInterface (interface), AbstractVisualizer (abstract <text:span text:style-name="T3">class</text:span> with shared control panel), VisualizerWindow, and CompareWindow.</text:p>
        </text:list-item>
        <text:list-item>
          <text:p text:style-name="P5">view/components - Contains BarPanel (the animated bar chart) and StatsWindow (the performance statistics popup).</text:p>
        </text:list-item>
      </text:list>
      <text:h text:style-name="P4" text:outline-level="2">5.2 Diagrammes des modules et des classes</text:h>
      <text:p text:style-name="P7">The architecture relies on interface and abstract class design at every layer:</text:p>
      <text:list text:continue-numbering="true" text:style-name="WWNum2">
        <text:list-item>
          <text:p text:style-name="P5"><text:soft-page-break/>Generator layer: AbstractGenerator enforces a strict initialization sequence through the init() method, guaranteeing that generate() always runs before data is accessed.</text:p>
        </text:list-item>
        <text:list-item>
          <text:p text:style-name="P5">Sorting layer: All five algorithm classes operate on the standard java.util.List interface, making them interchangeable in the controller without any data structure changes.</text:p>
        </text:list-item>
        <text:list-item>
          <text:p text:style-name="P5">Controller layer: AbstractSortRunner is a SwingWorker base class that handles listener registration, stats timing, and algorithm dispatch via a switch. SortRunner and CompareSortRunner extend it and only implement the done() callback.</text:p>
        </text:list-item>
        <text:list-item>
          <text:p text:style-name="P5">View layer: AbstractMenu <text:span text:style-name="T3">has</text:span> shared color constants, button factory methods, and entropy validation logic reused by all three menu classes. AbstractVisualizer builds the shared control panel (Start, Pause, Reset, View Performance, Back to Menu, Size spinner, Speed slider) reused by both window classes.</text:p>
        </text:list-item>
        <text:list-item>
          <text:p text:style-name="P5">MVC separation: VisualizerWindow and CompareWindow are pure views, they contain no sorting logic. All decisions are delegated to VisualizerController and CompareController respectively.</text:p>
        </text:list-item>
      </text:list>
      <text:h text:style-name="P4" text:outline-level="2">5.3 Chaînes de traitement (comment les classes interagissent et pourquoi)</text:h>
      <text:p text:style-name="P7">A key element of our architecture is the implementation of the Observer Design Pattern to track comparisons and swaps.</text:p>
      <text:list text:continue-numbering="true" text:style-name="WWNum2">
        <text:list-item>
          <text:p text:style-name="P5">Event Triggering: Inside each sorting class, calls to SortingListener.notifyComparison() and SortingListener.notifySwap() are inserted at every relevant operation.</text:p>
        </text:list-item>
        <text:list-item>
          <text:p text:style-name="P5">Notification: SortingListener acts as a static ThreadLocal dispatcher. Each sorting thread maintains its own isolated listener list, which prevents event cross-contamination when two algorithms run in parallel in compare mode.</text:p>
        </text:list-item>
        <text:list-item>
          <text:p text:style-name="P5">Dual listeners: Two listeners are registered per sort run - VisualizationListener updates the bar panel in real-time, and StatsListener silently increments the SortStats counters.</text:p>
        </text:list-item>
        <text:list-item>
          <text:p text:style-name="P5"><text:soft-page-break/>Decoupled view: By using this chain, the algorithms do not need to know whether they are being observed by a terminal or a graphical UI. They simply broadcast their state changes.</text:p>
        </text:list-item>
      </text:list>
      <text:p text:style-name="P8">The typical execution flow follows these steps:</text:p>
      <text:list text:continue-numbering="true" text:style-name="WWNum2">
        <text:list-item>
          <text:p text:style-name="P5">Step 1: The user selects an algorithm and a generator (Random or Entropy with a disorder level) from the menu.</text:p>
        </text:list-item>
        <text:list-item>
          <text:p text:style-name="P5">Step 2: The controller creates the appropriate generator and produces the dataset.</text:p>
        </text:list-item>
        <text:list-item>
          <text:p text:style-name="P5">Step 3: On Start, the controller registers VisualizationListener and StatsListener, then launches the sort in a background SwingWorker thread.</text:p>
        </text:list-item>
        <text:list-item>
          <text:p text:style-name="P5">Step 4: Every comparison and swap inside the algorithm fires an event to both listeners simultaneously.</text:p>
        </text:list-item>
        <text:list-item>
          <text:p text:style-name="P5">Step 5: VisualizationListener highlights the relevant bars and applies the speed delay. StatsListener increments its counters silently.</text:p>
        </text:list-item>
        <text:list-item>
          <text:p text:style-name="P5">Step 6: When the sort finishes, the controller calls back the view to enable the View Performance button.</text:p>
        </text:list-item>
        <text:list-item>
          <text:p text:style-name="P5">Step 7: The user clicks View Performance to open the StatsWindow, which reads the final values from SortStats and displays comparisons, swaps, and elapsed time.</text:p>
        </text:list-item>
      </text:list>
      <text:h text:style-name="P3" text:outline-level="1">6. Expérimentations</text:h>
      <text:p text:style-name="P6"><text:span text:style-name="T1">Note: This section currently focuses on functional verification. Quantitative performance results (benchmarks) will be added in the next phase.</text:span></text:p>
      <text:h text:style-name="P3" text:outline-level="1">7. Conclusion</text:h>
      <text:p text:style-name="P6"><text:span text:style-name="T1">Note: To be expanded. Currently, our project generates data and sorts it while tracking operations. Our next major step is to implement the Graphical Visualization and Benchmark modules to begin the formal scientific analys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Andika" svg:font-family="Andika"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fr" fo:country="FR"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2pt" fo:language="fr" fo:country="FR"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529cm" fo:margin-bottom="0.212cm" style:contextual-spacing="false"/>
      <style:text-properties fo:color="#000000"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423cm" fo:margin-bottom="0.176cm" style:contextual-spacing="false"/>
      <style:text-properties fo:color="#000000"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Normal_20__28_Web_29_" style:display-name="Normal (Web)" style:family="paragraph" style:parent-style-name="Standard">
      <style:paragraph-properties fo:margin-top="0.176cm" fo:margin-bottom="0.176cm" style:contextual-spacing="false" fo:line-height="100%" fo:text-align="start" style:justify-single-word="false" fo:orphans="2" fo:widows="2"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3-06T15:07:44.256000000</meta:creation-date>
    <dc:date>2026-03-06T16:38:30.218482479</dc:date>
    <meta:editing-duration>PT9M8S</meta:editing-duration>
    <meta:document-statistic meta:table-count="0" meta:image-count="0" meta:object-count="0" meta:page-count="7" meta:paragraph-count="83" meta:word-count="1894" meta:character-count="12417" meta:non-whitespace-character-count="10645"/>
    <meta:generator>LibreOffice/24.2.7.2$Linux_X86_64 LibreOffice_project/420$Build-2</meta:generator>
  </office:meta>
</office:document-meta>
</file>